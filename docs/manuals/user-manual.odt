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A0000014D603927B1.png" manifest:media-type="image/png"/>
  <manifest:file-entry manifest:full-path="Pictures/1004FBC5000051C100001E138AD03AFD.svg" manifest:media-type="image/svg+xml"/>
  <manifest:file-entry manifest:full-path="Pictures/10000000000001840000012650343679.png" manifest:media-type="image/png"/>
  <manifest:file-entry manifest:full-path="Pictures/100000010000019D0000019DC6E4DD09.png" manifest:media-type="image/png"/>
  <manifest:file-entry manifest:full-path="Pictures/10005A540000253500002535FC57AAA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adornments="Regular" style:font-family-generic="modern" style:font-pitch="fixed"/>
    <style:font-face style:name="Noto Sans Bengali" svg:font-family="'Noto Sans Bengali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uposhi Bangla Pr UNI:ss01" svg:font-family="'Ruposhi Bangla Pr UNI:ss01'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3e6b4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401c0e"/>
    </style:style>
    <style:style style:name="P5" style:family="paragraph" style:parent-style-name="Heading_20_2">
      <style:text-properties officeooo:paragraph-rsid="003e6b4c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paragraph-rsid="0020be32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paragraph-properties fo:text-align="justify" style:justify-single-word="false"/>
      <style:text-properties officeooo:paragraph-rsid="003b012d"/>
    </style:style>
    <style:style style:name="P10" style:family="paragraph" style:parent-style-name="Example">
      <style:text-properties officeooo:paragraph-rsid="0042fd45"/>
    </style:style>
    <style:style style:name="P11" style:family="paragraph" style:parent-style-name="Example">
      <style:text-properties officeooo:paragraph-rsid="004c79c5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Example">
      <style:text-properties officeooo:paragraph-rsid="0044adad"/>
    </style:style>
    <style:style style:name="P14" style:family="paragraph" style:parent-style-name="Example">
      <style:text-properties officeooo:paragraph-rsid="004bc576"/>
    </style:style>
    <style:style style:name="P15" style:family="paragraph" style:parent-style-name="Text_20_body">
      <style:text-properties officeooo:paragraph-rsid="0044adad"/>
    </style:style>
    <style:style style:name="T1" style:family="text">
      <style:text-properties officeooo:rsid="002995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Noto Mono'" style:font-pitch="fixed"/>
    </style:style>
    <style:style style:name="T4" style:family="text">
      <style:text-properties fo:color="#5555ff" loext:opacity="100%"/>
    </style:style>
    <style:style style:name="T5" style:family="text">
      <style:text-properties fo:font-weight="bold" officeooo:rsid="001b55be" style:font-weight-asian="bold" style:font-weight-complex="bold"/>
    </style:style>
    <style:style style:name="T6" style:family="text">
      <style:text-properties officeooo:rsid="001b55be"/>
    </style:style>
    <style:style style:name="T7" style:family="text">
      <style:text-properties officeooo:rsid="003c12ac"/>
    </style:style>
    <style:style style:name="T8" style:family="text">
      <style:text-properties officeooo:rsid="0028f4fc"/>
    </style:style>
    <style:style style:name="T9" style:family="text">
      <style:text-properties officeooo:rsid="003e6b4c"/>
    </style:style>
    <style:style style:name="T10" style:family="text">
      <style:text-properties fo:font-family="'Noto Sans Bengali'" style:font-style-name="SemiBold" style:font-family-generic="swiss" style:font-pitch="variable" style:font-family-complex="'Font Awesome 6 Pro Regular'" style:font-pitch-complex="variable"/>
    </style:style>
    <style:style style:name="T11" style:family="text">
      <style:text-properties fo:font-family="'Noto Sans Bengali'" style:font-style-name="SemiBold" style:font-family-generic="swiss" style:font-pitch="variable" style:font-family-complex="'Noto Sans Bengali'" style:font-style-name-complex="SemiBold" style:font-family-generic-complex="swiss" style:font-pitch-complex="variable"/>
    </style:style>
    <style:style style:name="T12" style:family="text">
      <style:text-properties fo:font-family="'Noto Sans Bengali'" style:font-style-name="SemiBold" style:font-family-generic="swiss" style:font-pitch="variable" officeooo:rsid="003b012d" style:font-family-complex="'Noto Sans Bengali'" style:font-style-name-complex="SemiBold" style:font-family-generic-complex="swiss" style:font-pitch-complex="variable"/>
    </style:style>
    <style:style style:name="T13" style:family="text">
      <style:text-properties fo:font-family="'Noto Sans Bengali'" style:font-style-name="SemiBold" style:font-family-generic="swiss" style:font-pitch="variable" officeooo:rsid="00401c0e" style:font-family-complex="'Noto Sans Bengali'" style:font-style-name-complex="SemiBold" style:font-family-generic-complex="swiss" style:font-pitch-complex="variable"/>
    </style:style>
    <style:style style:name="T14" style:family="text">
      <style:text-properties officeooo:rsid="00401c0e"/>
    </style:style>
    <style:style style:name="T15" style:family="text">
      <style:text-properties officeooo:rsid="003e08e1"/>
    </style:style>
    <style:style style:name="T16" style:family="text">
      <style:text-properties officeooo:rsid="0020be32"/>
    </style:style>
    <style:style style:name="T17" style:family="text">
      <style:text-properties officeooo:rsid="004e4b76"/>
    </style:style>
    <style:style style:name="T18" style:family="text">
      <style:text-properties officeooo:rsid="0044adad"/>
    </style:style>
    <style:style style:name="T19" style:family="text">
      <style:text-properties officeooo:rsid="00463e4c"/>
    </style:style>
    <style:style style:name="T20" style:family="text">
      <style:text-properties fo:color="#5555ff" loext:opacity="100%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y="0.011cm" svg:width="1.337cm" svg:height="1.337cm" draw:z-index="0"><draw:image xlink:href="Pictures/10005A540000253500002535FC57AAAC.svg" xlink:type="simple" xlink:show="embed" xlink:actuate="onLoad" draw:mime-type="image/svg+xml"/><draw:image xlink:href="Pictures/100000010000019D0000019DC6E4DD09.png" xlink:type="simple" xlink:show="embed" xlink:actuate="onLoad" draw:mime-type="image/png"/></draw:frame></text:p>
      <text:p text:style-name="Title">ইউনিজয় কিবোর্ড</text:p>
      <text:p text:style-name="Subtitle">ব্যবহার নির্দেশিকা</text:p>
      <text:h text:style-name="Heading_20_1" text:outline-level="1">ইউনিজয়় কী?</text:h>
      <text:p text:style-name="P1">বিজয়় লেআউট বাংলাদেশে সর্বাধিক ব্যবহৃত হলেও তা মূলত আসকি-ভিত্তিক (ASCII) বাংলা সফটওয়্যারের জন্য তৈরি হওয়ায় উইন্ডোজে ডিফল্ট হিসেবে অন্তর্ভুক্ত নেই এবং ইউনিকোডের সাথে সামঞ্জস্যপূর্ণ নয়। ফলে বাংলা লেখার জন্য সাধারণত কোনো না কোনো থার্ড-পার্টি সফটওয়্যার (বিজয় বায়ান্নো, বিজয় একুশে, অভ্র, বর্ণ ইত্যাদি) প্রয়োজন হয়।</text:p>
      <text:p text:style-name="P1">ইউনিজয় কিবোর্ড বিজয়ের পরিচিত কি-পজিশন অবিকল রেখে সরাসরি উইন্ডোজ, লিনাক্স ও অ্যান্ড্রয়েডের নিজস্ব ইউনিকোড ইনপুট মেথডে যুক্ত হয়ে যায়<text:span text:style-name="T1">।</text:span> ফলে কোনো তৃতীয় পক্ষের সফটওয়্যার ছাড়াই বিজয়ের অভ্যস্ত হাতে সরাসরি বাংলা লেখা যায়।</text:p>
      <text:p text:style-name="P1">লেআউটটি ১৯৯৯ সালে একুশে প্রকল্প (Ekushey Project) কর্তৃক তৈরি হয় এবং ২০০৫ সালের ৭ ডিসেম্বর GNU LGPL লাইসেন্সের অধীনে m17n প্রজেক্ট ডেটাবেসে অন্তর্ভুক্ত হয়।</text:p>
      <text:p text:style-name="P1">মূল বিজয় লেআউটের সাথে গুরুত্বপূর্ণ পার্থক্য: ও-কার ও ঔ-কার এবং কিছু যুক্তবর্ণ (রেফ, র‍্য ইত্যাদি) টাইপ করার পদ্ধতি সম্পূর্ণভাবে ইউনিকোড স্ট্যান্ডার্ড অনুসরণ করে। এই নির্দেশিকার শেষাংশে টাইপিংয়ের নিয়মগুলো বিস্তারিতভাবে ব্যাখ্যা করা হয়েছে।</text:p>
      <text:h text:style-name="Heading_20_1" text:outline-level="1">ইনস্টলেশন</text:h>
      <text:p text:style-name="P2">MSKLC (Microsoft Keyboard Layout Creator) দিয়ে তৈরি একটি ইনস্টলার রিলিজের সাথে দেওয়া আছে; এটি ডাউনলোড করে চালালেই কোনো তৃতীয় পক্ষের সফটওয়্যার ছাড়াই সরাসরি উইন্ডোজে ইউনিজয় লেআউট যুক্ত হয়ে যায়।</text:p>
      <text:list text:style-name="L1">
        <text:list-item>
          <text:p text:style-name="P3"><text:span text:style-name="T2">ডাউনলোড: </text:span>সর্বশেষ রিলিজ থেকে <text:span text:style-name="T3">unijoy-windows-installer.zip</text:span> ডাউনলোড করুন: <text:a xlink:type="simple" xlink:href="https://github.com/OishikStudio/unijoy/releases/latest" text:style-name="Internet_20_link" text:visited-style-name="Visited_20_Internet_20_Link"><text:span text:style-name="T4">github.com/OishikStudio/unijoy/releases/latest</text:span></text:a></text:p>
        </text:list-item>
        <text:list-item>
          <text:p text:style-name="P3"><text:span text:style-name="T2">ই</text:span><text:span text:style-name="T5">ন্সটল:</text:span><text:span text:style-name="T6"> </text:span>জিপ ফাইলটি এক্সট্র্যাক্ট করে ভেতরের <text:span text:style-name="T3">setup.exe</text:span> রান করুন (administrator অনুমতি প্রয়োজন <text:span text:style-name="T7">হতে পারে</text:span>)। <draw:frame draw:style-name="fr2" draw:name="Image3" text:anchor-type="char" svg:y="0.829cm" svg:width="4.763cm" svg:height="3.609cm" draw:z-index="3"><draw:image xlink:href="Pictures/10000000000001840000012650343679.png" xlink:type="simple" xlink:show="embed" xlink:actuate="onLoad" draw:mime-type="image/png"/></draw:frame>Windows SmartScreen-এ “unrecognized app” সতর্কবার্তা দেখাতে পারে<text:span text:style-name="T8">।</text:span> এক্ষেত্রে <text:span text:style-name="code">More info → Run anyway</text:span> <text:span text:style-name="T9">ক্লিক করুন</text:span>। এরপর User Account Control (UAC) অনুমতি চাইলে Yes <text:span text:style-name="T9">ক্লিক করুন</text:span>।</text:p>
        </text:list-item>
        <text:list-item>
          <text:p text:style-name="P4"><text:span text:style-name="T2">কিবোর্ড পরিবর্তন:</text:span> ইনস্টল শেষ হলে <text:s/><text:span text:style-name="T10"></text:span><text:span text:style-name="T11"> + Space</text:span><text:span text:style-name="T12">bar</text:span><text:span text:style-name="T11"> চেপে </text:span><text:span text:style-name="T13">অথবা</text:span> টাস্কবার <text:span text:style-name="T14">থেকে</text:span> <text:span text:style-name="T11">Ban</text:span>gla (Unijoy) নির্বাচন করুন।</text:p>
        </text:list-item>
      </text:list>
      <text:p text:style-name="Footnote">ইনস্টলার সাধারণত বাংলা ভাষা ও ইউনিজয় কিবোর্ড স্বয়ংক্রিয়ভাবেই যুক্ত করে দেয়। তা না হলে <text:span text:style-name="code">Settings → Time &amp; Language → Language &amp; Region → Add a language</text:span> থেকে ম্যানুয়ালি Bangla (Unijoy) যোগ করুন।</text:p>
      <text:h text:style-name="P5" text:outline-level="2"><text:soft-page-break/>নির্দেশিকা</text:h>
      <text:p text:style-name="Text_20_body">জিপ ফাইলের ভেতরে দুটি নির্দেশিকা পিডিএফ রয়েছে:</text:p>
      <text:p text:style-name="Text_20_body"><text:s text:c="4"/>• <text:span text:style-name="code"><text:span text:style-name="T3">user-manual.pdf</text:span></text:span><text:span text:style-name="T3">:</text:span> এই নির্দেশিকা; লেআউট ব্যবহারের সম্পূর্ণ নিয়মাবলি।</text:p>
      <text:p text:style-name="Text_20_body"><text:s text:c="4"/>• <text:span text:style-name="code"><text:span text:style-name="T3">bangla-ligature-list.pdf</text:span></text:span><text:span text:style-name="T3">: </text:span>বাংলা যুক্তাক্ষরের (ligature) সম্পূর্ণ তালিকা ও টাইপ করার পদ্ধতি।</text:p>
      <text:h text:style-name="Heading_20_2" text:outline-level="2">আনইনস্টল</text:h>
      <text:p text:style-name="Text_20_body"><text:span text:style-name="T3">setup.exe</text:span> আবার চালিয়ে <text:span text:style-name="T3">Remove the keyboard layout</text:span> অপশন বেছে নিন, অথবা <text:span text:style-name="code">Settings → Apps → Installed apps</text:span> থেকে “Unijoy” আনইনস্টল <text:span text:style-name="T15">করুন</text:span>।</text:p>
      <text:h text:style-name="Heading_20_1" text:outline-level="1">কিবোর্ড লেআউট</text:h>
      <text:p text:style-name="Text_20_body">ইউনিজয় কিবোর্ডে চারটি লেয়ার ব্যবহৃত হয়েছে:</text:p>
      <text:list text:style-name="L2">
        <text:list-item>
          <text:p text:style-name="P6"><text:span text:style-name="T2">Normal:</text:span> shift বা caps lock ছাড়াই টাইপ করা যায় (ইংরেজিতে ছোট হাতের অক্ষরের মতো)।</text:p>
        </text:list-item>
        <text:list-item>
          <text:p text:style-name="P6"><text:span text:style-name="T2">Shift:</text:span> shift চেপে টাইপ করতে হয় (ইংরেজিতে বড় হাতের অক্ষরের মতো); শুধু বর্ণের ক্ষেত্রে caps lock দিয়েও এই লেয়ার পাওয়া যায়।</text:p>
        </text:list-item>
        <text:list-item>
          <text:p text:style-name="P6"><text:span text:style-name="T2">AltGr:</text:span> Right Alt বা Ctrl + Alt চেপে টাইপ করতে হয় (২৬-এর অধিক বর্ণবিশিষ্ট ভাষার জন্য প্রযোজ্য)।</text:p>
        </text:list-item>
        <text:list-item>
          <text:p text:style-name="P6"><text:span text:style-name="T2">Shift + AltGr:</text:span> Shift চেপে Right Alt বা Shift + Alt + Ctrl চেপে টাইপ করতে হয়।</text:p>
        </text:list-item>
      </text:list>
      <text:p text:style-name="P7"><draw:frame draw:style-name="fr3" draw:name="Frame1" text:anchor-type="char" svg:x="1.51cm" svg:y="0.288cm" svg:width="13.982cm" draw:z-index="1"><draw:text-box fo:min-height="5.144cm"><text:p text:style-name="Caption"><draw:frame draw:style-name="fr4" draw:name="Image2" text:anchor-type="paragraph" svg:width="13.982cm" style:rel-width="100%" svg:height="5.144cm" style:rel-height="scale" draw:z-index="2"><draw:image xlink:href="Pictures/1004FBC5000051C100001E138AD03AFD.svg" xlink:type="simple" xlink:show="embed" xlink:actuate="onLoad" draw:mime-type="image/svg+xml"/><draw:image xlink:href="Pictures/100000010000038A0000014D603927B1.png" xlink:type="simple" xlink:show="embed" xlink:actuate="onLoad" draw:mime-type="image/png"/></draw:frame>চিত্র: ইউনিজয় কিবোর্ড লেআউট</text:p></draw:text-box></draw:frame></text:p>
      <text:p text:style-name="Footnote"><text:span text:style-name="T2">দ্রষ্টব্য:</text:span> ব্যবহারের সুবিধার্থে বাংলা স্বরবর্ণগুলো AltGr লেয়ারে থাকলেও Normal লেয়ারে হসন্ত (্) বা g চেপেও লেখা যায়<text:span text:style-name="T16">। </text:span>পরবর্তী অংশে বিস্তারিত আলোচনা করা হয়েছে।</text:p>
      <text:p text:style-name="Footnote">উইন্ডোজের নিজস্ব Touch Keyboard দিয়েও সরাসরি ইউনিজয়ে টাইপ করা যায়; সাধারণত থার্ড-পার্টি বাংলা টাইপিং সফটওয়্যারে এই সুবিধা থাকে না।</text:p>
      <text:p text:style-name="Text_20_body"/>
      <text:h text:style-name="P8" text:outline-level="1">বাংলা লেখা শুরু করা</text:h>
      <text:p text:style-name="P9">কিবোর্ড পরিবর্তনের জন্য <text:s/><text:span text:style-name="T10"></text:span><text:span text:style-name="T11"> + Space</text:span><text:span text:style-name="T12">bar</text:span> ব্যবহার করুন (Windows 7 বা তার পূর্ববর্তী সংস্করণে Left Alt + Shift)। বর্তমানে কোন কিবোর্ড সক্রিয় আছে তা সহজে বোঝার জন্য Desktop Language Bar চালু রাখতে পারেন (<text:span text:style-name="code">Control Panel → Language Preference → Advanced Settings</text:span>)।</text:p>
      <text:h text:style-name="Heading_20_1" text:outline-level="1">টাইপিং নির্দেশিকা</text:h>
      <text:h text:style-name="Heading_20_2" text:outline-level="2">স্বরবর্ণ</text:h>
      <text:p text:style-name="Text_20_body">বাংলা স্বরবর্ণগুলো AltGr লেয়ারে থাকলেও হসন্ত (g) চেপেও লেখা যায়। যেমন:</text:p>
      <text:p text:style-name="P10"><text:s/>্ + ি <text:s/>→ <text:s/>ই <text:s text:c="30"/>AltGr + <text:s/>ি <text:s text:c="2"/>→ <text:s/>ই</text:p>
      <text:p text:style-name="P11"><text:s/>্ + ূ <text:s text:c="2"/>→ <text:s/>ঊ <text:s text:c="29"/>AltGr + <text:s/>◌ূ <text:s text:c="3"/>→ <text:s/>ঊ</text:p>
      <text:p text:style-name="Text_20_body">বাংলা কার-চিহ্ন সবসময় ব্যঞ্জনবর্ণের পরে লিখতে হয়<text:span text:style-name="T1">।</text:span> শব্দটি যেভাবে উচ্চারিত হয়, ঠিক সেভাবেই টাইপ করতে হয়। যেমন:</text:p>
      <text:p text:style-name="Example">ম + ে + ড + ি + ক + ে + ল <text:s/>→ <text:s/>মেডিকেল</text:p>
      <text:h text:style-name="Heading_20_2" text:outline-level="2">যুক্তবর্ণ</text:h>
      <text:p text:style-name="Text_20_body">বাংলা গঠনরীতি অনুযায়ী দুটি ব্যঞ্জনবর্ণের মাঝে হসন্ত (্) দিয়ে যুক্তবর্ণ তৈরি করতে হয়। যেমন:</text:p>
      <text:p text:style-name="Example">ক + ্ + ক <text:s/>→ <text:s/>ক্ক</text:p>
      <text:p text:style-name="Example">ক + ্ + ষ <text:s/>→ <text:s/>ক্ষ</text:p>
      <text:p text:style-name="Example">স + ্ + ট <text:s text:c="2"/>→ <text:s/>স্ট</text:p>
      <text:h text:style-name="Heading_20_2" text:outline-level="2">যুক্তবর্ণ তৈরি হতে না দেওয়া</text:h>
      <text:p text:style-name="Text_20_body">দুটি ব্যঞ্জনবর্ণের মাঝে হসন্ত রেখেও যুক্তবর্ণ তৈরি না করতে চাইলে AltGr g চাপতে হবে। যেমন:</text:p>
      <text:p text:style-name="Example">ক + AltGr g + ক <text:s/>→ <text:s/>ক্‌ক</text:p>
      <text:p text:style-name="Example">ক + AltGr g + স <text:s/>→ <text:s/>ক্‌স</text:p>
      <text:p text:style-name="Text_20_body">এভাবে হসন্তের পর ZWNJ (Zero Width Non-Joiner) নামের একটি বিশেষ ইউনিকোড ক্যারেক্টার যুক্ত হয়, যা দুটি ব্যঞ্জনবর্ণকে যুক্ত হতে দেয় না।</text:p>
      <text:h text:style-name="P12" text:outline-level="2">য-ফলা</text:h>
      <text:p text:style-name="Text_20_body">কিবোর্ড থেকে সরাসরি য-ফলা <text:span text:style-name="T17">(্য)</text:span> লেখা যায়:</text:p>
      <text:p text:style-name="Example">ক + য-ফলা <text:span text:style-name="T18">(Z)</text:span> <text:s/>→ <text:s/>ক্য</text:p>
      <text:p text:style-name="P13">ম + য-ফলা <text:span text:style-name="T18">(Z) </text:span>→ <text:s/>ম্য</text:p>
      <text:p text:style-name="Text_20_body">বিকল্পভাবে: ক / ম + ্ + য <text:s/>→ <text:s/>ক্য / ম্য</text:p>
      <text:h text:style-name="Heading_20_2" text:outline-level="2">রেফ</text:h>
      <text:p text:style-name="Text_20_body">উচ্চারণ অনুযায়ী রেফ অন্য বর্ণের আগে টাইপ করতে হয়, কারণ উচ্চারণের সময় রেফ অন্য বর্ণের আগেই উচ্চারিত হয়। যেমন:</text:p>
      <text:p text:style-name="Example">রেফ <text:span text:style-name="T18">(A)</text:span> + ক <text:s/>→ <text:s/>র্ক</text:p>
      <text:p text:style-name="P13">রেফ <text:span text:style-name="T18">(A) </text:span>+ ম <text:s/>→ <text:s/>র্ম</text:p>
      <text:p text:style-name="Text_20_body">বিকল্পভাবে: র + ্ (হসন্ত) + ক / ম <text:s/>→ <text:s/>র্ক / র্ম</text:p>
      <text:h text:style-name="Heading_20_2" text:outline-level="2">র‍্য</text:h>
      <text:p text:style-name="Text_20_body">AltGr v চাপলে সরাসরি ‘র‍্য’ টাইপ হয়। বিকল্পভাবে র-এর পর AltGr z চাপলেও ‘র‍্য’ পাওয়া যায়।</text:p>
      <text:p text:style-name="P14">র + ZWJ + ◌্‌ + য <text:s/>→ <text:s/>র‍্য</text:p>
      <text:p text:style-name="P15">রেফ ও য-ফলার নিয়মের দ্বন্দ্বের কারণে সাধারণ র <text:span text:style-name="T19">+ </text:span>হসন্ত + য দিয়ে টাইপ করলে ফন্টভেদে তা ‘র্য’ হিসেবে দেখাতে পারে; ‘র‍্য’ নিশ্চিত করতে AltGr z ব্যবহার করুন।</text:p>
      <text:h text:style-name="Heading_20_2" text:outline-level="2">চন্দ্রবিন্দু</text:h>
      <text:p text:style-name="Text_20_body">ইউনিকোড নিয়ম অনুযায়ী কার/মাত্রা চিহ্নের (ি, ী, ু, ূ, ৈ, ৌ, ে, ো) পরে চন্দ্রবিন্দু (ঁ) টাইপ করতে হয়। যেমন:</text:p>
      <text:p text:style-name="Example">চ + া + ঁ + দ <text:s/>→ <text:s/>চাঁদ</text:p>
      <text:p text:style-name="Example">ব + া + ঁ + কা <text:s/>→ <text:s/>বাঁকা</text:p>
      <text:p text:style-name="Example">ই + ঁ + দ + ু + র <text:s/>→ <text:s/>ইঁদুর</text:p>
      <text:h text:style-name="Heading_20_1" text:outline-level="1">মতামত ও যোগাযোগ</text:h>
      <text:p text:style-name="Text_20_body">এই নির্দেশিকা সম্পর্কে যেকোনো মতামত বা পরামর্শ জানাতে যোগাযোগ করুন।</text:p>
      <text:p text:style-name="Text_20_body">Md. Rifat Hasan Jihan<text:line-break/><text:a xlink:type="simple" xlink:href="https://rhjihan.github.io/" text:style-name="Internet_20_link" text:visited-style-name="Visited_20_Internet_20_Link"><text:span text:style-name="T20">rhjihan.github.io</text:span></text:a><text:span text:style-name="T4"><text:line-break/></text:span><text:a xlink:type="simple" xlink:href="https://unijoy.pages.dev/" text:style-name="Internet_20_link" text:visited-style-name="Visited_20_Internet_20_Link"><text:span text:style-name="T20">unijoy.pages.dev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adornments="Regular" style:font-family-generic="modern" style:font-pitch="fixed"/>
    <style:font-face style:name="Noto Sans Bengali" svg:font-family="'Noto Sans Bengali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uposhi Bangla Pr UNI:ss01" svg:font-family="'Ruposhi Bangla Pr UNI:ss01'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ource Han Sans CN Regular" style:font-size-asian="12pt" style:language-asian="zh" style:country-asian="CN" style:font-name-complex="Ruposhi Bangla Pr UNI:ss01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ource Han Sans CN Regular" style:font-size-asian="12pt" style:language-asian="zh" style:country-asian="CN" style:font-name-complex="Ruposhi Bangla Pr UNI:ss0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Bengali" fo:font-family="'Noto Sans Bengali'" style:font-style-name="Regular" style:font-family-generic="swiss" style:font-pitch="variable" style:font-name-complex="Noto Sans Bengali" style:font-family-complex="'Noto Sans Bengali'" style:font-style-name-complex="Regular" style:font-family-generic-complex="swiss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 Bengali" fo:font-family="'Noto Sans Bengali'" style:font-style-name="Regular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Noto Sans Bengali" style:font-family-complex="'Noto Sans Bengali'" style:font-style-name-complex="Regular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 fo:line-height="120%"/>
      <style:text-properties fo:font-size="11pt" style:font-size-complex="11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5pt" fo:font-weight="bold" style:font-size-asian="28pt" style:font-weight-asian="bold" style:font-size-complex="15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3pt" style:font-size-asian="18pt" style:font-size-complex="13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padding="0.049cm" fo:border-left="none" fo:border-right="none" fo:border-top="none" fo:border-bottom="0.74pt solid #5555ff"/>
      <style:text-properties fo:font-size="110%" fo:font-weight="bold" style:font-size-asian="130%" style:font-weight-asian="bold" style:font-size-complex="11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2pt" fo:font-weight="bold" style:font-size-asian="115%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cm" fo:margin-bottom="0.21cm" style:contextual-spacing="false" fo:line-height="150%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style-name="Regular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Noto Sans Bengali" style:font-family-complex="'Noto Sans Bengali'" style:font-style-name-complex="Regular" style:font-family-generic-complex="swiss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xample" style:family="paragraph" style:parent-style-name="Standard" style:master-page-name="">
      <loext:graphic-properties draw:fill="solid" draw:fill-color="#efefff"/>
      <style:paragraph-properties fo:margin-left="0.801cm" fo:margin-right="0cm" fo:margin-top="0cm" fo:margin-bottom="0.21cm" style:contextual-spacing="true" fo:line-height="115%" style:page-number="auto" fo:background-color="#efefff" fo:padding="0.3cm" fo:border-left="0.51pt solid #5555ff" fo:border-right="none" fo:border-top="none" fo:border-bottom="none"/>
      <style:text-properties fo:font-size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5555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ode" style:family="text">
      <style:text-properties style:font-name="Noto Sans Bengali" fo:font-family="'Noto Sans Bengali'" style:font-style-name="Regular" style:font-family-generic="swiss" style:font-pitch="variable" fo:font-size="11pt" fo:background-color="#eeeeee" style:font-name-complex="Noto Sans Bengali" style:font-family-complex="'Noto Sans Bengali'" style:font-style-name-complex="Regular" style:font-family-generic-complex="swiss" style:font-pitch-complex="variable" style:font-size-complex="11pt" loext:padding="0.15cm" loext:border-left="0.06pt solid #ffffff" loext:border-right="0.06pt solid #ffffff" loext:border-top="none" loext:border-bottom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justify" style:justify-single-word="false" fo:padding="0.049cm" fo:border-left="none" fo:border-right="none" fo:border-top="none" fo:border-bottom="0.06pt solid #5555ff"/>
      <style:text-properties officeooo:paragraph-rsid="002bc870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ইউনিজয় কিবোর্ড <text:s text:c="130"/>ব্যবহার নির্দেশিকা</text:p>
      </style:header>
      <style:footer>
        <text:p text:style-name="MP2">Oishik Studi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2T14:11:27.493704000</meta:creation-date>
    <dc:title>ইউনিজয় কিবোর্ড ব্যবহার নির্দেশিকা</dc:title>
    <meta:editing-cycles>49</meta:editing-cycles>
    <meta:generator>LibreOffice/25.2.3.2$Linux_X86_64 LibreOffice_project/520$Build-2</meta:generator>
    <meta:editing-duration>PT1H5M48S</meta:editing-duration>
    <meta:initial-creator>Md. Rifat Hasan Jihan</meta:initial-creator>
    <dc:date>2026-07-13T23:47:57.773125543</dc:date>
    <dc:creator>Md. Rifat Hasan Jihan</dc:creator>
    <dc:contributor>Md. Rifat Hasan Jihan</dc:contributor>
    <dc:rights>Md. Rifat Hasan Jihan</dc:rights>
    <meta:print-date>2026-07-13T23:47:38.221188361</meta:print-date>
    <meta:printed-by>PDF files: Md. Rifat Hasan Jihan</meta:printed-by>
    <meta:document-statistic meta:table-count="0" meta:image-count="3" meta:object-count="0" meta:page-count="4" meta:paragraph-count="72" meta:word-count="859" meta:character-count="3958" meta:non-whitespace-character-count="2803"/>
    <meta:template xlink:type="simple" xlink:actuate="onRequest" xlink:title="Default" xlink:href="../../../../../.config/libreoffice/4/user/template/Default.ott" meta:date="2026-07-12T14:11:26.887684260"/>
  </office:meta>
</office:document-meta>
</file>