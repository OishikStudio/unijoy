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rjhor" svg:font-family="Nirjhor" style:font-pitch="variable"/>
    <style:font-face style:name="Noto Sans CJK SC" svg:font-family="'Noto Sans CJK SC'" style:font-family-generic="system" style:font-pitch="variable"/>
    <style:font-face style:name="Noto Serif Bengali" svg:font-family="'Noto Serif Bengali'" style:font-family-generic="roman" style:font-pitch="variable"/>
    <style:font-face style:name="Noto Serif Bengali1" svg:font-family="'Noto Serif Bengali'" style:font-adornments="SemiBold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Bengali" fo:font-size="11pt" style:font-size-asian="11pt" style:font-name-complex="Noto Serif Bengali" style:font-size-complex="11pt"/>
    </style:style>
    <style:style style:name="P2" style:family="paragraph" style:parent-style-name="Standard">
      <style:text-properties style:font-name="Noto Serif Bengali" fo:font-size="11pt" officeooo:paragraph-rsid="00074b97" style:font-size-asian="11pt" style:font-name-complex="Noto Serif Bengali" style:font-size-complex="11pt"/>
    </style:style>
    <style:style style:name="P3" style:family="paragraph" style:parent-style-name="Standard">
      <style:text-properties style:font-name="Noto Serif Bengali" fo:font-size="11pt" officeooo:rsid="000bcb2b" officeooo:paragraph-rsid="000bcb2b" style:font-size-asian="11pt" style:font-name-complex="Noto Serif Bengali" style:font-size-complex="11pt"/>
    </style:style>
    <style:style style:name="T1" style:family="text">
      <style:text-properties officeooo:rsid="000928ca"/>
    </style:style>
    <style:style style:name="T2" style:family="text">
      <style:text-properties officeooo:rsid="000b4976"/>
    </style:style>
    <style:style style:name="T3" style:family="text">
      <style:text-properties officeooo:rsid="000e76e3"/>
    </style:style>
    <style:style style:name="T4" style:family="text">
      <style:text-properties style:use-window-font-color="true" loext:opacity="0%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ক্ক = ক + ক</text:p>
      <text:p text:style-name="P1">ক্ট = ক + ট</text:p>
      <text:p text:style-name="P1">ক্ট্র = ক + ট + র</text:p>
      <text:p text:style-name="P1">ক্ত = ক + ত</text:p>
      <text:p text:style-name="P1">ক্ত্র = ক + ত + র</text:p>
      <text:p text:style-name="P1">ক্ব = ক + ব</text:p>
      <text:p text:style-name="P1">ক্ম = ক + ম</text:p>
      <text:p text:style-name="P1">ক্য = ক + য</text:p>
      <text:p text:style-name="P1">ক্র = ক + র</text:p>
      <text:p text:style-name="P1">ক্ল = ক + ল</text:p>
      <text:p text:style-name="P1">ক্ষ = ক + ষ</text:p>
      <text:p text:style-name="P1">ক্ষ্ণ = ক + ষ + ণ</text:p>
      <text:p text:style-name="P1">ক্ষ্ব = ক + ষ + ব</text:p>
      <text:p text:style-name="P1">ক্ষ্ম = ক + ষ + ম</text:p>
      <text:p text:style-name="P1">ক্ষ্ম্য = ক + ষ + ম + য</text:p>
      <text:p text:style-name="P1">ক্ষ্য = ক + ষ + য</text:p>
      <text:p text:style-name="P1">ক্স = ক + স</text:p>
      <text:p text:style-name="P1">খ্য = খ + য</text:p>
      <text:p text:style-name="P1">খ্র = খ+ র</text:p>
      <text:p text:style-name="P1">গ্‌ণ = গ + ণ</text:p>
      <text:p text:style-name="P1">গ্ধ = গ + ধ</text:p>
      <text:p text:style-name="P1">গ্ধ্য = গ + ধ + য</text:p>
      <text:p text:style-name="P1">গ্ধ্র = গ + ধ + র</text:p>
      <text:p text:style-name="P1">গ্ন = গ + ন</text:p>
      <text:p text:style-name="P1">গ্ন্য = গ + ন + য</text:p>
      <text:p text:style-name="P1">গ্ব = গ + ব</text:p>
      <text:p text:style-name="P1">গ্ম = গ + ম</text:p>
      <text:p text:style-name="P1">গ্য = গ + য</text:p>
      <text:p text:style-name="P1">গ্র = গ + র</text:p>
      <text:p text:style-name="P1">গ্র্য = গ + র + য</text:p>
      <text:p text:style-name="P1">গ্ল = গ + ল</text:p>
      <text:p text:style-name="P1">ঘ্ন = ঘ + ন</text:p>
      <text:p text:style-name="P1">ঘ্য = ঘ + য</text:p>
      <text:p text:style-name="P1">ঘ্র = ঘ + র</text:p>
      <text:p text:style-name="P1">ঙ্ক = ঙ + ক</text:p>
      <text:p text:style-name="P1">ঙ্‌ক্ত = ঙ + ক + ত</text:p>
      <text:p text:style-name="P1">ঙ্ক্য = ঙ + ক + য</text:p>
      <text:p text:style-name="P1">ঙ্ক্ষ = ঙ + ক + ষ</text:p>
      <text:p text:style-name="P1">ঙ্খ = ঙ + খ</text:p>
      <text:p text:style-name="P1">ঙ্গ = ঙ + গ</text:p>
      <text:p text:style-name="P1">ঙ্গ্য = ঙ + গ + য</text:p>
      <text:p text:style-name="P1">ঙ্ঘ = ঙ + ঘ</text:p>
      <text:p text:style-name="P1">ঙ্ঘ্য = ঙ + ঘ + য</text:p>
      <text:p text:style-name="P1">ঙ্ঘ্র = ঙ + ঘ + র</text:p>
      <text:p text:style-name="P1">ঙ্ম = ঙ + ম</text:p>
      <text:p text:style-name="P1">চ্চ = চ + চ</text:p>
      <text:p text:style-name="P1">চ্ছ = চ + ছ</text:p>
      <text:p text:style-name="P1">চ্ছ্ব = চ + ছ + ব</text:p>
      <text:p text:style-name="P1">চ্ছ্র = চ + ছ + র</text:p>
      <text:p text:style-name="P1">চ্ঞ = চ + ঞ</text:p>
      <text:p text:style-name="P1">চ্ব = চ + ব</text:p>
      <text:p text:style-name="P1">চ্য = চ + য</text:p>
      <text:p text:style-name="P1">জ্জ = জ + জ</text:p>
      <text:p text:style-name="P1">জ্জ্ব = জ + জ + ব</text:p>
      <text:p text:style-name="P1">জ্ঝ = জ + ঝ</text:p>
      <text:p text:style-name="P1">জ্ঞ = জ + ঞ</text:p>
      <text:p text:style-name="P1">জ্ব = জ + ব</text:p>
      <text:p text:style-name="P1">জ্য = জ + য</text:p>
      <text:p text:style-name="P1">জ্র = জ + র</text:p>
      <text:p text:style-name="P1">ঞ্চ = ঞ + চ</text:p>
      <text:p text:style-name="P1">ঞ্ছ = ঞ + ছ</text:p>
      <text:p text:style-name="P1">ঞ্জ = ঞ + জ</text:p>
      <text:p text:style-name="P1">ঞ্ঝ = ঞ + ঝ</text:p>
      <text:p text:style-name="P1">ট্ট = ট + ট</text:p>
      <text:p text:style-name="P1">ট্ব = ট + ব</text:p>
      <text:p text:style-name="P1">ট্ম = ট + ম</text:p>
      <text:p text:style-name="P1">ট্য = ট + য</text:p>
      <text:p text:style-name="P1">ট্র = ট + র</text:p>
      <text:p text:style-name="P1">ড্ড = ড + ড</text:p>
      <text:p text:style-name="P1">ড্ব = ড + ব</text:p>
      <text:p text:style-name="P1">ড্য = ড + য</text:p>
      <text:p text:style-name="P1">ড্র = ড + র</text:p>
      <text:p text:style-name="P1">ড়্গ = ড় + গ</text:p>
      <text:p text:style-name="P1">ঢ্য = ঢ + য</text:p>
      <text:p text:style-name="P1">ঢ্র = ঢ + র</text:p>
      <text:p text:style-name="P1">ণ্ট = ণ + ট</text:p>
      <text:p text:style-name="P1">ণ্ঠ = ণ + ঠ</text:p>
      <text:p text:style-name="P1">ণ্ঠ্য = ণ + ঠ + য</text:p>
      <text:p text:style-name="P1">ণ্ড = ণ + ড</text:p>
      <text:p text:style-name="P1">ণ্ড্য = ণ + ড + য</text:p>
      <text:p text:style-name="P1">ণ্ড্র = ণ + ড + র</text:p>
      <text:p text:style-name="P1">ণ্ঢ = ণ + ঢ</text:p>
      <text:p text:style-name="P1">ণ্ণ = ণ + ণ</text:p>
      <text:p text:style-name="P1">ণ্ব = ণ + ব</text:p>
      <text:p text:style-name="P1">ণ্ম = ণ + ম</text:p>
      <text:p text:style-name="P1">ণ্য = ণ + য</text:p>
      <text:p text:style-name="P1">ত্ত = ত + ত</text:p>
      <text:p text:style-name="P1">ত্ত্ব = ত + ত + ব</text:p>
      <text:p text:style-name="P1">ত্ত্য = ত + ত + য</text:p>
      <text:p text:style-name="P1">ত্থ = ত + থ</text:p>
      <text:p text:style-name="P1">ত্ন = ত + ন</text:p>
      <text:p text:style-name="P1">ত্ব = ত + ব</text:p>
      <text:p text:style-name="P1">ত্ম = ত + ম</text:p>
      <text:p text:style-name="P1">ত্ম্য = ত + ম + য</text:p>
      <text:p text:style-name="P1">ত্য = ত + য</text:p>
      <text:p text:style-name="P1">ত্র = ত + র</text:p>
      <text:p text:style-name="P1">ত্র্য = ত + র + য</text:p>
      <text:p text:style-name="P1">থ্ব = থ + ব</text:p>
      <text:p text:style-name="P1">থ্য = থ + য</text:p>
      <text:p text:style-name="P1">থ্র = থ + র</text:p>
      <text:p text:style-name="P1">দ্গ = দ + গ</text:p>
      <text:p text:style-name="P1">দ্ঘ = দ + ঘ</text:p>
      <text:p text:style-name="P1">দ্দ = দ + দ</text:p>
      <text:p text:style-name="P1">দ্দ্ব = দ + দ + ব</text:p>
      <text:p text:style-name="P1">দ্ধ = দ + ধ</text:p>
      <text:p text:style-name="P1">দ্ব = দ + ব</text:p>
      <text:p text:style-name="P1">দ্ভ = দ + ভ</text:p>
      <text:p text:style-name="P1">দ্ভ্র = দ + ভ + র</text:p>
      <text:p text:style-name="P1">দ্ম = দ + ম</text:p>
      <text:p text:style-name="P1">দ্য = দ + য</text:p>
      <text:p text:style-name="P1">দ্র = দ + র</text:p>
      <text:p text:style-name="P1">দ্র্য = দ + র + য</text:p>
      <text:p text:style-name="P1">ধ্ন = ধ + ন</text:p>
      <text:p text:style-name="P1">ধ্ব = ধ + ব</text:p>
      <text:p text:style-name="P1">ধ্ম = ধ + ম</text:p>
      <text:p text:style-name="P1">ধ্য = ধ + য</text:p>
      <text:p text:style-name="P1">ধ্র = ধ + র</text:p>
      <text:p text:style-name="P1">ন্ট = ন + ট</text:p>
      <text:p text:style-name="P1">ন্ট্র = ন + ট + র</text:p>
      <text:p text:style-name="P2">ন্ঠ = ন + ঠ</text:p>
      <text:p text:style-name="P2">ন্ড = ন + ড</text:p>
      <text:p text:style-name="P1">ন্ড্র = ন + ড + র</text:p>
      <text:p text:style-name="P1">ন্ত = ন + ত</text:p>
      <text:p text:style-name="P1">ন্ত্ব = ন + ত + ব</text:p>
      <text:p text:style-name="P1">ন্ত্য = ন + ত + য</text:p>
      <text:p text:style-name="P1">ন্ত্র = ন + ত + র</text:p>
      <text:p text:style-name="P1">ন্ত্র্য = ন + ত + র + য</text:p>
      <text:p text:style-name="P1">ন্থ = ন + থ</text:p>
      <text:p text:style-name="P1">ন্থ্র = ন + থ + র</text:p>
      <text:p text:style-name="P1">ন্দ = ন + দ</text:p>
      <text:p text:style-name="P1">ন্দ্য = ন + দ + য</text:p>
      <text:p text:style-name="P1">ন্দ্ব = ন + দ + ব</text:p>
      <text:p text:style-name="P1">ন্দ্র = ন + দ + র</text:p>
      <text:p text:style-name="P1">ন্ধ = ন + ধ</text:p>
      <text:p text:style-name="P1">ন্ধ্য = ন + ধ + য</text:p>
      <text:p text:style-name="P1">ন্ধ্র = ন + ধ + র</text:p>
      <text:p text:style-name="P1">ন্ন = ন + ন</text:p>
      <text:p text:style-name="P1">ন্ব = ন + ব</text:p>
      <text:p text:style-name="P1">ন্ম = ন + ম</text:p>
      <text:p text:style-name="P1">ন্য = ন + য</text:p>
      <text:p text:style-name="P1">প্ট = প + ট</text:p>
      <text:p text:style-name="P1">প্ত = প + ত</text:p>
      <text:p text:style-name="P1">প্ন = প + ন</text:p>
      <text:p text:style-name="P1">প্প = প + প</text:p>
      <text:p text:style-name="P1">প্য = প + য</text:p>
      <text:p text:style-name="P1">প্র = প + র</text:p>
      <text:p text:style-name="P1">প্র্য = প + র + য</text:p>
      <text:p text:style-name="P1">প্ল = প + ল</text:p>
      <text:p text:style-name="P1">প্স = প + স</text:p>
      <text:p text:style-name="P1">ফ্র = ফ + র</text:p>
      <text:p text:style-name="P1">ফ্ল = ফ + ল</text:p>
      <text:p text:style-name="P1">ব্জ = ব + জ</text:p>
      <text:p text:style-name="P1">ব্দ = ব + দ</text:p>
      <text:p text:style-name="P1">ব্ধ = ব + ধ</text:p>
      <text:p text:style-name="P1">ব্ব = ব + ব</text:p>
      <text:p text:style-name="P1">ব্য = ব + য</text:p>
      <text:p text:style-name="P1"><text:soft-page-break/>ব্র = ব + র</text:p>
      <text:p text:style-name="P1">ব্ল = ব + ল</text:p>
      <text:p text:style-name="P1">ভ্ব =ভ + ব</text:p>
      <text:p text:style-name="P1">ভ্য = ভ + য</text:p>
      <text:p text:style-name="P1">ভ্র = ভ + র</text:p>
      <text:p text:style-name="P1">ম্ন = ম + ন</text:p>
      <text:p text:style-name="P1">ম্প = ম + প</text:p>
      <text:p text:style-name="P1">ম্প্র = ম + প + র</text:p>
      <text:p text:style-name="P1">ম্ফ = ম + ফ</text:p>
      <text:p text:style-name="P1">ম্ব = ম + ব</text:p>
      <text:p text:style-name="P1">ম্ব্র = ম + ব + র</text:p>
      <text:p text:style-name="P1">ম্ভ = ম + ভ</text:p>
      <text:p text:style-name="P1">ম্ভ্র = ম + ভ + র</text:p>
      <text:p text:style-name="P1">ম্ম = ম + ম</text:p>
      <text:p text:style-name="P1">ম্য = ম + য</text:p>
      <text:p text:style-name="P1">ম্র = ম + র</text:p>
      <text:p text:style-name="P1">ম্ল = ম + ল</text:p>
      <text:p text:style-name="P1">য্য = য + য</text:p>
      <text:p text:style-name="P1">র্ক = র + ক</text:p>
      <text:p text:style-name="P1">র্ক্য = র + ক + য</text:p>
      <text:p text:style-name="P1">র্গ্য = র + গ + য</text:p>
      <text:p text:style-name="P1">র্ঘ্য = র + ঘ + য</text:p>
      <text:p text:style-name="P1">র্চ্য = র + চ + য</text:p>
      <text:p text:style-name="P1">র্জ্য = র + জ + য</text:p>
      <text:p text:style-name="P1">র্ণ্য = র + ণ + য</text:p>
      <text:p text:style-name="P1">র্ত্য = র + ত + য</text:p>
      <text:p text:style-name="P1">র্থ্য = র + থ + য</text:p>
      <text:p text:style-name="P1">র্ব্য = র + ব + য</text:p>
      <text:p text:style-name="P1">র্ম্য = র + ম + য</text:p>
      <text:p text:style-name="P1">র্শ্য = র + শ + য</text:p>
      <text:p text:style-name="P1">র্ষ্য = র + ষ + য</text:p>
      <text:p text:style-name="P1">র্হ্য = র + হ + য</text:p>
      <text:p text:style-name="P1">র্খ = র + খ</text:p>
      <text:p text:style-name="P1">র্গ = র + গ</text:p>
      <text:p text:style-name="P1">র্গ্র = র + গ + র</text:p>
      <text:p text:style-name="P1">র্ঘ = র + ঘ</text:p>
      <text:p text:style-name="P1">র্চ = র + চ</text:p>
      <text:p text:style-name="P1">র্ছ = র + ছ</text:p>
      <text:p text:style-name="P1">র্জ = র + জ</text:p>
      <text:p text:style-name="P1">র্ঝ = র + ঝ</text:p>
      <text:p text:style-name="P1">র্ট = র + ট</text:p>
      <text:p text:style-name="P1">র্ড = র + ড</text:p>
      <text:p text:style-name="P1">র্ণ = র + ণ</text:p>
      <text:p text:style-name="P1">র্ত = র + ত</text:p>
      <text:p text:style-name="P1">র্ত্র = র + ত + র</text:p>
      <text:p text:style-name="P1">র্থ = র + থ</text:p>
      <text:p text:style-name="P1">র্দ = র + দ</text:p>
      <text:p text:style-name="P1">র্দ্ব = র + দ + ব</text:p>
      <text:p text:style-name="P1">র্দ্র = র + দ + র</text:p>
      <text:p text:style-name="P1">র্ধ = র + ধ</text:p>
      <text:p text:style-name="P1">র্ধ্ব = র + ধ + ব</text:p>
      <text:p text:style-name="P1">র্ন = র + ন</text:p>
      <text:p text:style-name="P1">র্প = র + প</text:p>
      <text:p text:style-name="P1">র্ফ = র + ফ</text:p>
      <text:p text:style-name="P1">র্ভ = র + ভ</text:p>
      <text:p text:style-name="P1">র্ম = র + ম</text:p>
      <text:p text:style-name="P1">র্য = র + য<text:line-break/>র‌্য <text:span text:style-name="T1">= র+য</text:span></text:p>
      <text:p text:style-name="P1">র্ল = র + ল</text:p>
      <text:p text:style-name="P1">র্শ = র + শ</text:p>
      <text:p text:style-name="P1">র্শ্ব = র+ শ + ব</text:p>
      <text:p text:style-name="P1">র্ষ = র + ষ</text:p>
      <text:p text:style-name="P1">র্স = র + স</text:p>
      <text:p text:style-name="P1">র্হ = র + হ</text:p>
      <text:p text:style-name="P1">র্ঢ্য = র + ঢ + য</text:p>
      <text:p text:style-name="P1">ল্ক = ল + ক</text:p>
      <text:p text:style-name="P1">ল্ক্য = ল + ক + য</text:p>
      <text:p text:style-name="P1">ল্গ = ল + গ</text:p>
      <text:p text:style-name="P1">ল্ট = ল + ট</text:p>
      <text:p text:style-name="P1">ল্ড = ল + ড</text:p>
      <text:p text:style-name="P1">ল্প = ল + প</text:p>
      <text:p text:style-name="P1">ল্‌ফ = ল + ফ</text:p>
      <text:p text:style-name="P1">ল্ব = ল + ব</text:p>
      <text:p text:style-name="P1">ল্‌ভ = ল + ভ</text:p>
      <text:p text:style-name="P1">ল্ম = ল + ম</text:p>
      <text:p text:style-name="P1">ল্য = ল + য</text:p>
      <text:p text:style-name="P1">ল্ল = ল + ল</text:p>
      <text:p text:style-name="P1">শ্চ = শ + চ</text:p>
      <text:p text:style-name="P1">শ্ছ = শ + ছ</text:p>
      <text:p text:style-name="P1">শ্ন = শ + ন</text:p>
      <text:p text:style-name="P1">শ্ব = শ + ব</text:p>
      <text:p text:style-name="P1">শ্ম = শ + ম</text:p>
      <text:p text:style-name="P1">শ্য = শ + য</text:p>
      <text:p text:style-name="P1">শ্র = শ + র</text:p>
      <text:p text:style-name="P1">শ্ল = শ + ল</text:p>
      <text:p text:style-name="P1">ষ্ক = ষ + ক</text:p>
      <text:p text:style-name="P1">ষ্ক্র = ষ + ক + র</text:p>
      <text:p text:style-name="P1">ষ্ট = ষ + ট</text:p>
      <text:p text:style-name="P1">ষ্ট্য = ষ + ট + য</text:p>
      <text:p text:style-name="P1">ষ্ট্র = ষ + ট + র</text:p>
      <text:p text:style-name="P1">ষ্ঠ = ষ + ঠ</text:p>
      <text:p text:style-name="P1">ষ্ঠ্য = ষ + ঠ + য</text:p>
      <text:p text:style-name="P1">ষ্ণ = ষ + ণ</text:p>
      <text:p text:style-name="P1">ষ্প = ষ + প</text:p>
      <text:p text:style-name="P1">ষ্প্র = ষ + প + র</text:p>
      <text:p text:style-name="P1">ষ্ফ = ষ + ফ</text:p>
      <text:p text:style-name="P1">ষ্ব = ষ + ব</text:p>
      <text:p text:style-name="P1">ষ্ম = ষ + ম</text:p>
      <text:p text:style-name="P1">ষ্য = ষ + য</text:p>
      <text:p text:style-name="P1">স্ক = স + ক</text:p>
      <text:p text:style-name="P1">স্ক্র = স + ক্র</text:p>
      <text:p text:style-name="P1">স্খ = স + খ</text:p>
      <text:p text:style-name="P1">স্ট = স + ট</text:p>
      <text:p text:style-name="P1">স্ট্র = স + ট্র</text:p>
      <text:p text:style-name="P1">স্ত = স + ত</text:p>
      <text:p text:style-name="P1">স্ত্ব = স + ত + ব</text:p>
      <text:p text:style-name="P1">স্ত্য = স + ত + য</text:p>
      <text:p text:style-name="P1">স্ত্র = স + ত + র</text:p>
      <text:p text:style-name="P1">স্থ = স + থ</text:p>
      <text:p text:style-name="P1">স্থ্য = স + থ + য</text:p>
      <text:p text:style-name="P1">স্ন = স + ন</text:p>
      <text:p text:style-name="P1">স্প = স + প</text:p>
      <text:p text:style-name="P1">স্প্র = স + প +র</text:p>
      <text:p text:style-name="P1">স্ফ = স + ফ</text:p>
      <text:p text:style-name="P1">স্ব = স + ব</text:p>
      <text:p text:style-name="P1">স্ম = স + ম</text:p>
      <text:p text:style-name="P1">স্য = স + য</text:p>
      <text:p text:style-name="P1">স্র = স + র</text:p>
      <text:p text:style-name="P1">স্ল = স + ল</text:p>
      <text:p text:style-name="P1">হ্ণ = হ + ণ</text:p>
      <text:p text:style-name="P1">হ্ন = হ + ন</text:p>
      <text:p text:style-name="P1">হ্ব = হ + ব</text:p>
      <text:p text:style-name="P1">হ্ম = হ + ম</text:p>
      <text:p text:style-name="P1">হ্য = হ + য</text:p>
      <text:p text:style-name="P1">হ্র = হ + র</text:p>
      <text:p text:style-name="P1">হ্ল = হ + ল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দুটি বর্ণ সংযুক্ত করতে হসন্ত <text:span text:style-name="T2">(্) ব্যবহার করতে হবে।</text:span></text:p>
      <text:p text:style-name="P1"/>
      <text:p text:style-name="P1"/>
      <text:p text:style-name="P3"><text:span text:style-name="T3">Md. </text:span>Rifat Hasan Jihan<text:line-break/><text:a xlink:type="simple" xlink:href="https://rhjihan.github.io/" text:style-name="Internet_20_link" text:visited-style-name="Visited_20_Internet_20_Link"><text:span text:style-name="T4">rhjihan.github.io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rjhor" svg:font-family="Nirjhor" style:font-pitch="variable"/>
    <style:font-face style:name="Noto Sans CJK SC" svg:font-family="'Noto Sans CJK SC'" style:font-family-generic="system" style:font-pitch="variable"/>
    <style:font-face style:name="Noto Serif Bengali" svg:font-family="'Noto Serif Bengali'" style:font-family-generic="roman" style:font-pitch="variable"/>
    <style:font-face style:name="Noto Serif Bengali1" svg:font-family="'Noto Serif Bengali'" style:font-adornments="SemiBold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style:font-size-asian="15pt" style:font-weight-asian="bold" style:font-name-complex="Noto Serif Bengali1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Nirjhor" fo:font-size="10.5pt" officeooo:paragraph-rsid="000bcb2b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বাংলা যুক্তবর্ণের তালিকা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d. Rifat Hasan Jihan</meta:initial-creator>
    <meta:creation-date>2026-07-02T14:46:13.387802013</meta:creation-date>
    <meta:editing-duration>PT1M14S</meta:editing-duration>
    <meta:editing-cycles>3</meta:editing-cycles>
    <meta:generator>LibreOffice/25.2.3.2$Linux_X86_64 LibreOffice_project/520$Build-2</meta:generator>
    <dc:title>বাংলা যুক্তবর্ণের তালিকা</dc:title>
    <dc:contributor>Md. Rifat Hasan Jihan</dc:contributor>
    <dc:date>2026-07-02T23:08:16.356742195</dc:date>
    <dc:creator>Md. Rifat Hasan Jihan</dc:creator>
    <meta:keyword>ligature</meta:keyword>
    <meta:keyword>bangla</meta:keyword>
    <meta:print-date>2026-07-02T23:08:19.607857623</meta:print-date>
    <meta:printed-by>PDF files: Md. Rifat Hasan Jihan</meta:printed-by>
    <meta:document-statistic meta:table-count="0" meta:image-count="0" meta:object-count="0" meta:page-count="2" meta:paragraph-count="285" meta:word-count="1580" meta:character-count="2939" meta:non-whitespace-character-count="1644"/>
  </office:meta>
</office:document-meta>
</file>